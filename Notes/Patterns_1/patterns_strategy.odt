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a62" officeooo:paragraph-rsid="000f1a62"/>
    </style:style>
    <style:style style:name="P2" style:family="paragraph" style:parent-style-name="Standard">
      <style:text-properties officeooo:rsid="000f93af" officeooo:paragraph-rsid="000f93af"/>
    </style:style>
    <style:style style:name="T1" style:family="text">
      <style:text-properties officeooo:rsid="000f9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 Patterns <text:s/>strategy</text:p>
      <text:p text:style-name="P1"/>
      <text:p text:style-name="P1"/>
      <text:p text:style-name="P1">pattern contain</text:p>
      <text:p text:style-name="P1">rows</text:p>
      <text:p text:style-name="P1">coloum</text:p>
      <text:p text:style-name="P1"/>
      <text:p text:style-name="P1"/>
      <text:p text:style-name="P1">basic idea</text:p>
      <text:p text:style-name="P1">outer loop Handle rows</text:p>
      <text:p text:style-name="P1">inner loop handle cols</text:p>
      <text:p text:style-name="P1"/>
      <text:p text:style-name="P1">//for square pattern</text:p>
      <text:p text:style-name="P1">for(int i=1;i&lt;=n;i++)</text:p>
      <text:p text:style-name="P1">{</text:p>
      <text:p text:style-name="P1">//rows</text:p>
      <text:p text:style-name="P1">for(int j = 1;j&lt;=n;j++)</text:p>
      <text:p text:style-name="P1">{</text:p>
      <text:p text:style-name="P1">//cols</text:p>
      <text:p text:style-name="P1">print(“*”); //i th row , j <text:s/>cols</text:p>
      <text:p text:style-name="P1">}</text:p>
      <text:p text:style-name="P1">print();</text:p>
      <text:p text:style-name="P1"/>
      <text:p text:style-name="P1">}</text:p>
      <text:p text:style-name="P1"/>
      <text:p text:style-name="P1"/>
      <text:p text:style-name="P1"/>
      <text:p text:style-name="P1"/>
      <text:p text:style-name="P1">//<text:span text:style-name="T1">for square of number</text:span></text:p>
      <text:p text:style-name="P2">for(rows outer loop)</text:p>
      <text:p text:style-name="P2">{</text:p>
      <text:p text:style-name="P2">for(cols inner loop)</text:p>
      <text:p text:style-name="P2">{</text:p>
      <text:p text:style-name="P2">print(rows variable); //for printing number of rows in inner loop</text:p>
      <text:p text:style-name="P2">print(col variable); // for printing number of coloumns in inner loop</text:p>
      <text:p text:style-name="P2"/>
      <text:p text:style-name="P2">//inner loop will work according to number of rows</text:p>
      <text:p text:style-name="P2">//first it go from 1 to n rows then inner loop end</text:p>
      <text:p text:style-name="P2">//until end of outer loop inner loop also work </text:p>
      <text:p text:style-name="P2">}</text:p>
      <text:p text:style-name="P2"/>
      <text:p text:style-name="P2">//outer loop go from 1 to n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09:56:56.709443500</meta:creation-date>
    <dc:date>2026-07-16T10:53:24.805823500</dc:date>
    <meta:editing-duration>PT15M6S</meta:editing-duration>
    <meta:editing-cycles>2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31" meta:word-count="112" meta:character-count="595" meta:non-whitespace-character-count="511"/>
  </office:meta>
</office:document-meta>
</file>