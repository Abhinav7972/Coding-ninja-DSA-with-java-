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a62" officeooo:paragraph-rsid="000f1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 Patterns <text:s/>strategy</text:p>
      <text:p text:style-name="P1"/>
      <text:p text:style-name="P1"/>
      <text:p text:style-name="P1">pattern contain</text:p>
      <text:p text:style-name="P1">rows</text:p>
      <text:p text:style-name="P1">coloum</text:p>
      <text:p text:style-name="P1"/>
      <text:p text:style-name="P1"/>
      <text:p text:style-name="P1">basic idea</text:p>
      <text:p text:style-name="P1">outer loop Handle rows</text:p>
      <text:p text:style-name="P1">inner loop handle cols</text:p>
      <text:p text:style-name="P1"/>
      <text:p text:style-name="P1">//for square pattern</text:p>
      <text:p text:style-name="P1">for(int i=1;i&lt;=n;i++)</text:p>
      <text:p text:style-name="P1">{</text:p>
      <text:p text:style-name="P1">//rows</text:p>
      <text:p text:style-name="P1">for(int j = 1;j&lt;=n;j++)</text:p>
      <text:p text:style-name="P1">{</text:p>
      <text:p text:style-name="P1">//cols</text:p>
      <text:p text:style-name="P1"><text:s/>print(“*”); //i th row , j <text:s/>cols</text:p>
      <text:p text:style-name="P1">}</text:p>
      <text:p text:style-name="P1">print()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09:56:56.709443500</meta:creation-date>
    <dc:date>2026-07-16T10:05:34.839803400</dc:date>
    <meta:editing-duration>PT8M51S</meta:editing-duration>
    <meta:editing-cycles>1</meta:editing-cycles>
    <meta:document-statistic meta:table-count="0" meta:image-count="0" meta:object-count="0" meta:page-count="1" meta:paragraph-count="18" meta:word-count="40" meta:character-count="222" meta:non-whitespace-character-count="197"/>
    <meta:generator>LibreOffice/26.2.4.2$Windows_X86_64 LibreOffice_project/0229ac93fcf0d7cbc6376066c6f35021cef002dc</meta:generator>
  </office:meta>
</office:document-meta>
</file>